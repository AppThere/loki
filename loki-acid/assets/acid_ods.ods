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office:version="1.2">
  <office:automatic-styles>
    <style:style style:name="cAcidNum" style:family="table-cell" style:data-style-name="AcidNum" style:display-name="cAcidNum"/>
    <style:style style:name="cRot" style:family="table-cell" style:display-name="cRot">
      <style:table-cell-properties style:rotation-angle="90"/>
    </style:style>
    <style:style style:name="cDiag" style:family="table-cell" style:display-name="cDiag">
      <style:table-cell-properties fo:border="0.5pt solid #2F3C7E" style:diagonal-bl-tr="0.5pt solid #B85042"/>
    </style:style>
  </office:automatic-styles>
  <office:body>
    <office:spreadsheet>
      <table:table table:name="Sheet1">
        <table:table-row>
          <table:table-cell>
            <text:p>Loki ACID — ODS</text:p>
          </table:table-cell>
        </table:table-row>
        <table:table-row>
          <table:table-cell>
            <text:p>TC-ODS-005 ODF formula</text:p>
          </table:table-cell>
          <table:table-cell office:value-type="float" office:value="1"/>
          <table:table-cell office:value-type="float" office:value="2"/>
          <table:table-cell office:value-type="float" office:value="3"/>
          <table:table-cell office:value-type="float" office:value="6" table:formula="of:=SUM([.B2:.D2])">
            <text:p>=SUM</text:p>
          </table:table-cell>
        </table:table-row>
        <table:table-row>
          <table:table-cell>
            <text:p>TC-ODS-002 repeat</text:p>
          </table:table-cell>
          <table:table-cell table:number-columns-repeated="5"/>
          <table:table-cell>
            <text:p>after-repeat marker</text:p>
          </table:table-cell>
        </table:table-row>
        <table:table-row>
          <table:table-cell table:number-columns-spanned="3" table:number-rows-spanned="1">
            <text:p>TC-ODS-003 merged across 3</text:p>
          </table:table-cell>
          <table:covered-table-cell/>
          <table:covered-table-cell/>
        </table:table-row>
        <table:table-row>
          <table:table-cell>
            <text:p>TC-ODS-001 fmt</text:p>
          </table:table-cell>
          <table:table-cell table:style-name="cAcidNum" office:value-type="float" office:value="1234.5"/>
          <table:table-cell table:style-name="cAcidNum" office:value-type="float" office:value="-98.7"/>
        </table:table-row>
        <table:table-row>
          <table:table-cell>
            <text:p>TC-ODS-006 rot90</text:p>
          </table:table-cell>
          <table:table-cell table:style-name="cRot">
            <text:p>rotated</text:p>
          </table:table-cell>
        </table:table-row>
        <table:table-row>
          <table:table-cell>
            <text:p>TC-ODS-009 diag</text:p>
          </table:table-cell>
          <table:table-cell table:style-name="cDiag">
            <text:p>X</text:p>
          </table:table-cell>
        </table:table-row>
        <table:table-row>
          <table:table-cell>
            <text:p>TC-ODS-007 matrix</text:p>
          </table:table-cell>
          <table:table-cell office:value-type="float" office:value="0" table:formula="of:={=SUM([.B5:.D5]*[.B5:.D5])}"/>
        </table:table-row>
      </table:table>
      <table:named-expressions>
        <table:named-range table:name="HeaderRow" table:cell-range-address="$Sheet1.$A$2:$D$2"/>
      </table:named-expression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office:version="1.2">
  <office:styles>
    <style:style style:name="TCID" style:family="text" style:display-name="TCID">
      <style:text-properties fo:font-weight="bold" fo:color="#B85042"/>
    </style:style>
    <number:number-style style:name="AcidNum" style:display-name="AcidNum">
      <number:number number:decimal-places="2" number:min-integer-digits="1" number:grouping="true"/>
    </number:number-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office:version="1.2">
  <office:meta>
    <meta:generator>ODFPY/1.4.1</meta:generator>
  </office:meta>
</office:document-meta>
</file>