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float.png" manifest:media-type="image/pn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vg="urn:oasis:names:tc:opendocument:xmlns:svg-compatible:1.0" xmlns:xlink="http://www.w3.org/1999/xlink" office:version="1.2">
  <office:automatic-styles>
    <style:style style:name="PB" style:family="paragraph" style:display-name="PB">
      <style:paragraph-properties fo:break-before="page"/>
    </style:style>
    <style:style style:name="LhPct" style:family="paragraph" style:display-name="LhPct">
      <style:paragraph-properties fo:line-height="150%"/>
    </style:style>
    <style:style style:name="LhAtLeast" style:family="paragraph" style:display-name="LhAtLeast">
      <style:paragraph-properties style:line-height-at-least="0.4in"/>
    </style:style>
    <style:style style:name="TabP" style:family="paragraph" style:display-name="TabP">
      <style:paragraph-properties>
        <style:tab-stops>
          <style:tab-stop style:position="5in" style:type="right" style:leader-style="dotted" style:leader-text="."/>
        </style:tab-stops>
      </style:paragraph-properties>
    </style:style>
    <style:style style:name="DecP" style:family="paragraph" style:display-name="DecP">
      <style:paragraph-properties>
        <style:tab-stops>
          <style:tab-stop style:position="3in" style:type="char" style:char="."/>
        </style:tab-stops>
      </style:paragraph-properties>
    </style:style>
    <style:style style:name="DropP" style:family="paragraph" style:display-name="DropP">
      <style:paragraph-properties>
        <style:drop-cap style:lines="3" style:length="1" style:distance="0.1in"/>
      </style:paragraph-properties>
    </style:style>
    <style:style style:name="RtlP" style:family="paragraph" style:display-name="RtlP">
      <style:paragraph-properties style:writing-mode="rl-tb"/>
    </style:style>
    <style:style style:name="TwoCol" style:family="section" style:display-name="TwoCol">
      <style:section-properties>
        <style:columns fo:column-count="2" fo:column-gap="0.3in">
          <style:column style:rel-width="4000*"/>
          <style:column style:rel-width="6000*"/>
        </style:columns>
      </style:section-properties>
    </style:style>
    <text:list-style style:name="AcidList" style:display-name="AcidList">
      <text:list-level-style-bullet text:level="1" text:bullet-char="◆">
        <style:list-level-properties text:space-before="0.25in" text:min-label-width="0.25in"/>
      </text:list-level-style-bullet>
      <text:list-level-style-number text:level="2" style:num-suffix="." style:num-format="1">
        <style:list-level-properties text:space-before="0.5in" text:min-label-width="0.3in"/>
      </text:list-level-style-number>
    </text:list-style>
    <style:style style:name="TblCol" style:family="table-column" style:display-name="TblCol">
      <style:table-column-properties style:column-width="2in"/>
    </style:style>
    <style:style style:name="Cell" style:family="table-cell" style:display-name="Cell">
      <style:table-cell-properties fo:border="0.5pt solid #888888" fo:padding="0.04in"/>
    </style:style>
    <style:style style:name="FrFloat" style:family="graphic">
      <style:graphic-properties style:wrap="right" style:run-through="foreground"/>
    </style:style>
  </office:automatic-styles>
  <office:body>
    <office:text>
      <text:h text:outline-level="1">Loki ACID Rendering Suite — ODT</text:h>
      <text:p text:style-name="ChildEmph"><text:span text:style-name="TCID">TC-ODT-001  </text:span>This paragraph uses ChildEmph (parent=BaseBody). Family+size must be inherited; italic+teal overridden.</text:p>
      <text:p text:style-name="LhPct"><text:span text:style-name="TCID">TC-ODT-002  </text:span>Line-height 150%: the quick brown fox jumps over the lazy dog. the quick brown fox jumps over the lazy dog. the quick brown fox jumps over the lazy dog. the quick brown fox jumps over the lazy dog. </text:p>
      <text:p text:style-name="LhAtLeast"><text:span text:style-name="TCID">TC-ODT-002  </text:span>Line-height at-least 0.4in: the quick brown fox jumps over the lazy dog. the quick brown fox jumps over the lazy dog. the quick brown fox jumps over the lazy dog. </text:p>
      <text:p text:style-name="TabP"><text:span text:style-name="TCID">TC-ODT-005  </text:span>Chapter One<text:tab/>12</text:p>
      <text:p text:style-name="DecP"><text:tab/>1234.5</text:p>
      <text:p text:style-name="DecP"><text:tab/>7.89</text:p>
      <text:p text:style-name="DecP"><text:tab/>42.0</text:p>
      <text:p><text:span text:style-name="TCID">TC-ODT-004  </text:span>Multilevel list (diamond level 1, decimal level 2):</text:p>
      <text:list text:style-name="AcidList">
        <text:list-item>
          <text:p>Top diamond item</text:p>
          <text:list>
            <text:list-item>
              <text:p>Nested decimal item</text:p>
            </text:list-item>
          </text:list>
        </text:list-item>
        <text:list-item>
          <text:p>Second diamond item</text:p>
        </text:list-item>
      </text:list>
      <text:p><text:span text:style-name="TCID">TC-ODT-003  </text:span>Table: header spans 3 cols; A2 spans 2 rows (covered cells follow).</text:p>
      <table:table table:name="ODTspan">
        <table:table-column table:style-name="TblCol"/>
        <table:table-column table:style-name="TblCol"/>
        <table:table-column table:style-name="TblCol"/>
        <table:table-row>
          <table:table-cell table:style-name="Cell" table:number-columns-spanned="3">
            <text:p>Header spans 3 columns</text:p>
          </table:table-cell>
          <table:covered-table-cell/>
          <table:covered-table-cell/>
        </table:table-row>
        <table:table-row>
          <table:table-cell table:style-name="Cell" table:number-rows-spanned="2">
            <text:p>A spans 2 rows</text:p>
          </table:table-cell>
          <table:table-cell table:style-name="Cell">
            <text:p>B2</text:p>
          </table:table-cell>
          <table:table-cell table:style-name="Cell">
            <text:p>C2</text:p>
          </table:table-cell>
        </table:table-row>
        <table:table-row>
          <table:covered-table-cell/>
          <table:table-cell table:style-name="Cell">
            <text:p>B3</text:p>
          </table:table-cell>
          <table:table-cell table:style-name="Cell">
            <text:p>C3</text:p>
          </table:table-cell>
        </table:table-row>
      </table:table>
      <text:p><draw:frame draw:style-name="FrFloat" text:anchor-type="paragraph" svg:width="1in" svg:height="1in"><draw:image xlink:href="Pictures/float.png"/></draw:frame><text:span text:style-name="TCID">TC-ODT-007  </text:span>Frames + wrap: text flows beside the floating frame. Frames + wrap: text flows beside the floating frame. Frames + wrap: text flows beside the floating frame. Frames + wrap: text flows beside the floating frame. Frames + wrap: text flows beside the floating frame. Frames + wrap: text flows beside the floating frame.</text:p>
      <text:p text:style-name="PB"/>
      <text:p text:style-name="DropP"><text:span text:style-name="TCID">TC-ODT-013  </text:span>Dropped capital spanning three lines; body text must wrap to the right of the enlarged initial across all spanned lines. Dropped capital spanning three lines; body text must wrap to the right of the enlarged initial across all spanned lines. Dropped capital spanning three lines; body text must wrap to the right of the enlarged initial across all spanned lines. </text:p>
      <text:p text:style-name="RtlP"><text:span text:style-name="TCID">TC-ODT-012  </text:span>שלום world 123 עולם (mixed RTL/LTR + neutrals)</text:p>
      <text:p><text:span text:style-name="TCID">TC-ODT-006  </text:span>Two-column section follows:</text:p>
      <text:section text:style-name="TwoCol" text:name="ColsSec">
        <text:p>Column-flow paragraph 1. lorem ipsum dolor sit amet lorem ipsum dolor sit amet lorem ipsum dolor sit amet lorem ipsum dolor sit amet lorem ipsum dolor sit amet </text:p>
        <text:p>Column-flow paragraph 2. lorem ipsum dolor sit amet lorem ipsum dolor sit amet lorem ipsum dolor sit amet lorem ipsum dolor sit amet lorem ipsum dolor sit amet </text:p>
        <text:p>Column-flow paragraph 3. lorem ipsum dolor sit amet lorem ipsum dolor sit amet lorem ipsum dolor sit amet lorem ipsum dolor sit amet lorem ipsum dolor sit amet </text:p>
      </text:section>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TCID" style:family="text" style:display-name="TCID">
      <style:text-properties fo:font-weight="bold" fo:color="#B85042"/>
    </style:style>
    <style:style style:name="BaseBody" style:family="paragraph" style:display-name="BaseBody">
      <style:text-properties fo:font-family="Liberation Serif" fo:font-size="12pt" fo:color="#222222"/>
    </style:style>
    <style:style style:name="ChildEmph" style:family="paragraph" style:parent-style-name="BaseBody" style:display-name="ChildEmph">
      <style:text-properties fo:font-style="italic" fo:color="#1C7293"/>
    </style:style>
  </office:styles>
  <office:automatic-styles>
    <style:page-layout style:name="AcidPL">
      <style:page-layout-properties fo:page-width="8.5in" fo:page-height="11in" fo:margin-top="1in" fo:margin-bottom="1in" fo:margin-left="1in" fo:margin-right="1in"/>
    </style:page-layout>
  </office:automatic-styles>
  <office:master-styles>
    <style:master-page style:name="Standard" style:page-layout-name="AcidPL" style:display-name="Standard">
      <style:header>
        <text:p>Loki ACID — ODT  (master-page header)</text:p>
      </style:header>
      <style:footer>
        <text:p>footer · page</text:p>
      </style:footer>
    </style:master-page>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