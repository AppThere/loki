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dc="http://purl.org/dc/elements/1.1/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1" style:family="text">
      <style:text-properties style:font-name="Carlito" fo:font-family="Carlito"/>
    </style:style>
  </office:automatic-styles>
  <office:body>
    <office:text>
      <text:p><text:span text:style-name="T1">Conformance fixtures exercise the rendering pipeline end to end. Each paragraph flows through import, layout, and rasterization before the perceptual differ compares it against a reference render. Distinct sentence lengths keep every line break decisive.</text:span></text:p>
      <text:p><text:span text:style-name="T1">A second paragraph checks inter-paragraph spacing. Short words then follow: it is so, and we go on to the end of the blo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/>
  <office:automatic-styles>
    <style:page-layout style:name="PL1">
      <style:page-layout-properties fo:page-width="612pt" fo:page-height="792pt" fo:margin-top="72pt" fo:margin-bottom="72pt" fo:margin-left="72pt" fo:margin-right="72pt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/>
</office:document-meta>
</file>