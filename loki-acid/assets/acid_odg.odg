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office:version="1.2">
  <office:automatic-styles>
    <style:style style:name="sLin" style:family="graphic" style:display-name="sLin">
      <style:graphic-properties draw:fill="gradient" draw:fill-gradient-name="gLin" draw:stroke="solid" svg:stroke-color="#21295C"/>
    </style:style>
    <style:style style:name="sAxial" style:family="graphic" style:display-name="sAxial">
      <style:graphic-properties draw:fill="gradient" draw:fill-gradient-name="gAxial" draw:stroke="solid" svg:stroke-color="#21295C"/>
    </style:style>
    <style:style style:name="sRadial" style:family="graphic" style:display-name="sRadial">
      <style:graphic-properties draw:fill="gradient" draw:fill-gradient-name="gRadial" draw:stroke="solid" svg:stroke-color="#21295C"/>
    </style:style>
    <style:style style:name="sPlain" style:family="graphic" style:display-name="sPlain">
      <style:graphic-properties draw:fill="solid" draw:fill-color="#84B59F" draw:stroke="solid" svg:stroke-color="#21295C"/>
    </style:style>
    <style:style style:name="sPath" style:family="graphic" style:display-name="sPath">
      <style:graphic-properties draw:fill="solid" draw:fill-color="#6D2E46" draw:stroke="solid" svg:stroke-color="#21295C"/>
    </style:style>
    <style:style style:name="sConn" style:family="graphic" style:display-name="sConn">
      <style:graphic-properties draw:stroke="solid" svg:stroke-color="#2F3C7E" draw:marker-end="" svg:stroke-width="0.05in"/>
    </style:style>
  </office:automatic-styles>
  <office:body>
    <office:drawing>
      <draw:page draw:name="page1" draw:master-page-name="Default">
        <draw:frame svg:x="0.3in" svg:y="0.2in" svg:width="3in" svg:height="0.3in">
          <draw:text-box>
            <text:p>Loki ACID — ODG</text:p>
          </draw:text-box>
        </draw:frame>
        <draw:frame svg:x="0.3in" svg:y="0.7in" svg:width="3in" svg:height="0.3in">
          <draw:text-box>
            <text:p>TC-ODG-002 gradients: linear / axial / radial</text:p>
          </draw:text-box>
        </draw:frame>
        <draw:rect draw:style-name="sLin" svg:x="0.3in" svg:y="1.1in" svg:width="2.4in" svg:height="1.6in"/>
        <draw:rect draw:style-name="sAxial" svg:x="3.0in" svg:y="1.1in" svg:width="2.4in" svg:height="1.6in"/>
        <draw:ellipse draw:style-name="sRadial" svg:x="5.7in" svg:y="1.1in" svg:width="2.4in" svg:height="1.6in"/>
        <draw:frame svg:x="0.3in" svg:y="3.0in" svg:width="3in" svg:height="0.3in">
          <draw:text-box>
            <text:p>TC-ODG-001 Bezier path (cubic curve)</text:p>
          </draw:text-box>
        </draw:frame>
        <draw:path draw:style-name="sPath" svg:x="0.3in" svg:y="3.3in" svg:width="3in" svg:height="2in" svg:viewBox="0 0 3000 2000" svg:d="M0 2000 C 500 0 2500 0 3000 2000 L 1500 1200 Z"/>
        <draw:frame svg:x="4in" svg:y="3.0in" svg:width="3in" svg:height="0.3in">
          <draw:text-box>
            <text:p>TC-ODG-008 transform: rotate 20deg</text:p>
          </draw:text-box>
        </draw:frame>
        <draw:rect draw:style-name="sPlain" svg:x="4in" svg:y="3.4in" svg:width="2in" svg:height="1.2in" draw:transform="rotate(-0.35) translate(4in 3.4in)"/>
        <draw:frame svg:x="0.3in" svg:y="5.4in" svg:width="3in" svg:height="0.3in">
          <draw:text-box>
            <text:p>TC-ODG-004 connector</text:p>
          </draw:text-box>
        </draw:frame>
        <draw:rect draw:style-name="sPlain" svg:x="0.3in" svg:y="5.8in" svg:width="1.5in" svg:height="0.9in"/>
        <draw:rect draw:style-name="sPlain" svg:x="4in" svg:y="6.4in" svg:width="1.5in" svg:height="0.9in"/>
        <draw:connector draw:style-name="sConn" draw:type="standard" svg:x1="1.8in" svg:y1="6.25in" svg:x2="4in" svg:y2="6.85in" svg:viewBox="0 0 10000 10000" svg:d="M0 0 L10000 10000"/>
      </draw:page>
    </office:drawing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office:version="1.2">
  <office:styles>
    <draw:gradient draw:name="gLin" draw:style="linear" draw:start-color="#F96167" draw:end-color="#F9E795" draw:angle="450" draw:border="0" draw:start-intensity="100%" draw:end-intensity="100%" draw:display-name="gLin"/>
    <draw:gradient draw:name="gAxial" draw:style="axial" draw:start-color="#1C7293" draw:end-color="#CADCFC" draw:angle="900" draw:border="0" draw:start-intensity="100%" draw:end-intensity="100%" draw:display-name="gAxial"/>
    <draw:gradient draw:name="gRadial" draw:style="radial" draw:start-color="#F9E795" draw:end-color="#21295C" draw:angle="0" draw:border="0" draw:start-intensity="100%" draw:end-intensity="100%" draw:display-name="gRadial"/>
  </office:styles>
  <office:automatic-styles/>
  <office:master-styles>
    <style:master-page style:name="Default" style:page-layout-name="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number="urn:oasis:names:tc:opendocument:xmlns:datastyle:1.0" xmlns:of="urn:oasis:names:tc:opendocument:xmlns:of:1.2" xmlns:svg="urn:oasis:names:tc:opendocument:xmlns:svg-compatible:1.0" office:version="1.2">
  <office:meta>
    <meta:generator>ODFPY/1.4.1</meta:generator>
  </office:meta>
</office:document-meta>
</file>