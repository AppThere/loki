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dc="http://purl.org/dc/elements/1.1/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automatic-styles>
    <style:style style:name="T1" style:family="text">
      <style:text-properties style:font-name="Tinos" fo:font-family="Tinos"/>
    </style:style>
    <style:style style:name="T2" style:family="text">
      <style:text-properties style:font-name="Tinos" fo:font-family="Tinos" fo:font-weight="bold"/>
    </style:style>
    <style:style style:name="T3" style:family="text">
      <style:text-properties style:font-name="Tinos" fo:font-family="Tinos" fo:font-style="italic"/>
    </style:style>
  </office:automatic-styles>
  <office:body>
    <office:text>
      <text:h text:style-name="Heading1" text:outline-level="1"><text:span text:style-name="T1">Heading in Tinos</text:span></text:h>
      <text:p><text:span text:style-name="T1">Plain, </text:span><text:span text:style-name="T2">bold, </text:span><text:span text:style-name="T3">and italic</text:span><text:span text:style-name="T1"> tex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styles/>
  <office:automatic-styles>
    <style:page-layout style:name="PL1">
      <style:page-layout-properties fo:page-width="612pt" fo:page-height="792pt" fo:margin-top="72pt" fo:margin-bottom="72pt" fo:margin-left="72pt" fo:margin-right="72pt" style:print-orientation="portrait"/>
    </style:page-layout>
  </office:automatic-styles>
  <office:master-styles>
    <style:master-page style:name="Standard" style:page-layout-name="PL1"/>
  </office:master-styles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 office:version="1.3">
  <office:meta/>
</office:document-meta>
</file>