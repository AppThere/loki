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xmlns:dr3d="urn:oasis:names:tc:opendocument:xmlns:dr3d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xmlns:dr3d="urn:oasis:names:tc:opendocument:xmlns:dr3d:1.0" office:version="1.2">
  <office:automatic-styles>
    <style:style style:name="gpGrad" style:family="graphic" style:display-name="gpGrad">
      <style:graphic-properties draw:fill="gradient" draw:fill-gradient-name="odpGrad" draw:stroke="solid" svg:stroke-color="#21295C"/>
    </style:style>
    <style:style style:name="gpShadow" style:family="graphic" style:display-name="gpShadow">
      <style:graphic-properties draw:fill="solid" draw:fill-color="#1C7293" draw:stroke="none" dr3d:shadow="visible" draw:shadow-offset-x="0.08in" draw:shadow-offset-y="0.08in" draw:shadow-color="#000000" draw:shadow-opacity="50%"/>
    </style:style>
    <style:style style:name="gpFit" style:family="graphic" style:display-name="gpFit">
      <style:graphic-properties draw:fill="solid" draw:fill-color="#CADCFC" draw:stroke="solid" svg:stroke-color="#21295C" draw:auto-grow-height="false" draw:auto-grow-width="false" draw:fit-to-size="true"/>
    </style:style>
    <style:style style:name="gpCustom" style:family="graphic" style:display-name="gpCustom">
      <style:graphic-properties draw:fill="solid" draw:fill-color="#2C5F2D" draw:stroke="solid" svg:stroke-color="#21295C"/>
    </style:style>
    <style:style style:name="odpCell" style:family="table-cell" style:display-name="odpCell">
      <style:table-cell-properties fo:border="0.5pt solid #888888" fo:padding="0.04in"/>
    </style:style>
  </office:automatic-styles>
  <office:body>
    <office:presentation>
      <draw:page draw:name="TC-ODP-002_20_/_20_003_20__20_gradient_20_fill_20_+_20_drop_20_shadow" draw:master-page-name="Default">
        <draw:frame svg:x="0.4in" svg:y="0.2in" svg:width="9in" svg:height="0.7in">
          <draw:text-box>
            <text:p>TC-ODP-002 / 003  gradient fill + drop shadow</text:p>
          </draw:text-box>
        </draw:frame>
        <draw:rect draw:style-name="gpGrad" svg:x="0.6in" svg:y="1.3in" svg:width="4in" svg:height="3in"/>
        <draw:rect draw:style-name="gpShadow" svg:x="5.2in" svg:y="1.3in" svg:width="4in" svg:height="3in"/>
      </draw:page>
      <draw:page draw:name="TC-ODP-004_20_/_20_005_20__20_custom_20_shape_20_+_20_text_20_autofit" draw:master-page-name="Default">
        <draw:frame svg:x="0.4in" svg:y="0.2in" svg:width="9in" svg:height="0.7in">
          <draw:text-box>
            <text:p>TC-ODP-004 / 005  custom shape + text autofit</text:p>
          </draw:text-box>
        </draw:frame>
        <draw:custom-shape draw:style-name="gpCustom" svg:x="0.6in" svg:y="1.4in" svg:width="3.2in" svg:height="3.2in">
          <draw:enhanced-geometry draw:type="star5" svg:viewBox="0 0 21600 21600" draw:enhanced-path="M 10800 0 L 13500 8100 21600 8100 14850 13050 17550 21600 10800 16200 4050 21600 6750 13050 0 8100 8100 8100 Z N"/>
        </draw:custom-shape>
        <draw:frame draw:style-name="gpFit" svg:x="4.4in" svg:y="1.4in" svg:width="5in" svg:height="1in">
          <draw:text-box>
            <text:p>Autofit box: this text exceeds the box so the renderer must shrink-to-fit. this text exceeds the box so the renderer must shrink-to-fit. this text exceeds the box so the renderer must shrink-to-fit. </text:p>
          </draw:text-box>
        </draw:frame>
      </draw:page>
      <draw:page draw:name="TC-ODP-008_20__20_table_20_on_20_slide" draw:master-page-name="Default">
        <draw:frame svg:x="0.4in" svg:y="0.2in" svg:width="9in" svg:height="0.7in">
          <draw:text-box>
            <text:p>TC-ODP-008  table on slide</text:p>
          </draw:text-box>
        </draw:frame>
        <draw:frame svg:x="0.6in" svg:y="1.4in" svg:width="8in" svg:height="2.5in">
          <table:table table:name="odpT">
            <table:table-column/>
            <table:table-column/>
            <table:table-column/>
            <table:table-row>
              <table:table-cell table:style-name="odpCell">
                <text:p>r0c0</text:p>
              </table:table-cell>
              <table:table-cell table:style-name="odpCell">
                <text:p>r0c1</text:p>
              </table:table-cell>
              <table:table-cell table:style-name="odpCell">
                <text:p>r0c2</text:p>
              </table:table-cell>
            </table:table-row>
            <table:table-row>
              <table:table-cell table:style-name="odpCell">
                <text:p>r1c0</text:p>
              </table:table-cell>
              <table:table-cell table:style-name="odpCell">
                <text:p>r1c1</text:p>
              </table:table-cell>
              <table:table-cell table:style-name="odpCell">
                <text:p>r1c2</text:p>
              </table:table-cell>
            </table:table-row>
            <table:table-row>
              <table:table-cell table:style-name="odpCell">
                <text:p>r2c0</text:p>
              </table:table-cell>
              <table:table-cell table:style-name="odpCell">
                <text:p>r2c1</text:p>
              </table:table-cell>
              <table:table-cell table:style-name="odpCell">
                <text:p>r2c2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xmlns:dr3d="urn:oasis:names:tc:opendocument:xmlns:dr3d:1.0" office:version="1.2">
  <office:styles>
    <draw:gradient draw:name="odpGrad" draw:style="linear" draw:start-color="#B85042" draw:end-color="#F9E795" draw:angle="450" draw:start-intensity="100%" draw:end-intensity="100%" draw:border="0" draw:display-name="odpGrad"/>
  </office:styles>
  <office:automatic-styles>
    <style:page-layout style:name="odpPL">
      <style:page-layout-properties fo:page-width="10in" fo:page-height="7.5in"/>
    </style:page-layout>
  </office:automatic-styles>
  <office:master-styles>
    <style:master-page style:name="Default" style:page-layout-name="odpPL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xmlns:dr3d="urn:oasis:names:tc:opendocument:xmlns:dr3d:1.0" office:version="1.2">
  <office:meta>
    <meta:generator>ODFPY/1.4.1</meta:generator>
  </office:meta>
</office:document-meta>
</file>